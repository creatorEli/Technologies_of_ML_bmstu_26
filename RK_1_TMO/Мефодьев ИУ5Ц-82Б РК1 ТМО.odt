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7000001D6BF47B219.png" manifest:media-type="image/png"/>
  <manifest:file-entry manifest:full-path="Pictures/100000000000026800000189E111DBB8.png" manifest:media-type="image/png"/>
  <manifest:file-entry manifest:full-path="Pictures/1000000000000333000002D53846634A.png" manifest:media-type="image/png"/>
  <manifest:file-entry manifest:full-path="Pictures/100000000000021C0000018952386E41.png" manifest:media-type="image/png"/>
  <manifest:file-entry manifest:full-path="Pictures/1000000100000193000001FD65CC8CB0.png" manifest:media-type="image/png"/>
  <manifest:file-entry manifest:full-path="Pictures/1000000100000477000001D074602B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style:line-height-at-least="0.635cm" fo:text-indent="0cm" style:auto-text-indent="false"/>
      <style:text-properties fo:color="#3b3b3b" loext:opacity="100%" style:font-name="Droid Sans Mono" fo:font-size="16pt" fo:font-weight="bold" fo:background-color="#ffffff" style:font-size-asian="16pt" style:font-weight-asian="bold" style:font-size-complex="16pt" style:font-weight-complex="bold"/>
    </style:style>
    <style:style style:name="P2" style:family="paragraph" style:parent-style-name="Standard">
      <style:paragraph-properties style:line-height-at-least="0.635cm"/>
    </style:style>
    <style:style style:name="P3" style:family="paragraph" style:parent-style-name="Standard">
      <style:paragraph-properties fo:margin-left="0cm" fo:margin-right="0cm" style:line-height-at-least="0.635cm" fo:text-indent="0cm" style:auto-text-indent="false"/>
      <style:text-properties fo:color="#3b3b3b" loext:opacity="100%" style:font-name="Droid Sans Mono" fo:font-size="13.5pt" fo:font-weight="bold" fo:background-color="#ffffff" style:font-weight-asian="bold" style:font-weight-complex="bold"/>
    </style:style>
    <style:style style:name="P4" style:family="paragraph" style:parent-style-name="Standard">
      <style:paragraph-properties fo:margin-left="0cm" fo:margin-right="0cm" style:line-height-at-least="0.635cm" fo:text-indent="0cm" style:auto-text-indent="false"/>
      <style:text-properties fo:color="#3b3b3b" loext:opacity="100%" style:font-name="Droid Sans Mono" fo:font-size="13.5pt" fo:font-weight="normal" fo:background-color="#ffffff"/>
    </style:style>
    <style:style style:name="P5" style:family="paragraph" style:parent-style-name="Standard">
      <style:paragraph-properties fo:margin-top="0cm" fo:margin-bottom="0.499cm" style:contextual-spacing="false" style:line-height-at-least="0.635cm"/>
    </style:style>
    <style:style style:name="P6" style:family="paragraph" style:parent-style-name="Standard">
      <style:paragraph-properties fo:margin-left="0cm" fo:margin-right="0cm" style:line-height-at-least="0.635cm" fo:text-align="justify" style:justify-single-word="false" fo:text-indent="0cm" style:auto-text-indent="false"/>
      <style:text-properties fo:color="#3b3b3b" loext:opacity="100%" style:font-name="Droid Sans Mono" fo:font-size="13.5pt" fo:font-weight="normal" fo:background-color="#ffffff"/>
    </style:style>
    <style:style style:name="P7" style:family="paragraph" style:parent-style-name="Standard">
      <style:paragraph-properties fo:margin-left="0cm" fo:margin-right="0cm" style:line-height-at-least="0.635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style:line-height-at-least="0.635cm" fo:text-indent="0cm" style:auto-text-indent="false"/>
      <style:text-properties fo:color="#800000" loext:opacity="100%" style:font-name="Droid Sans Mono" fo:font-size="18pt" fo:font-weight="bold" fo:background-color="#ffffff" style:font-size-asian="18pt" style:font-size-complex="18pt"/>
    </style:style>
    <style:style style:name="P9" style:family="paragraph" style:parent-style-name="Standard">
      <style:paragraph-properties fo:margin-left="0cm" fo:margin-right="0cm" style:line-height-at-least="0.635cm" fo:text-indent="0cm" style:auto-text-indent="false"/>
    </style:style>
    <style:style style:name="P10" style:family="paragraph" style:parent-style-name="Standard">
      <style:paragraph-properties style:line-height-at-least="0.635cm" fo:text-align="justify" style:justify-single-word="false"/>
    </style:style>
    <style:style style:name="P11" style:family="paragraph" style:parent-style-name="Standard">
      <style:paragraph-properties fo:margin-top="0cm" fo:margin-bottom="0.499cm" style:contextual-spacing="false" style:line-height-at-least="0.635cm" fo:text-align="justify" style:justify-single-word="false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8000" loext:opacity="100%" style:font-name="Droid Sans Mono" fo:font-size="10pt" fo:font-weight="normal" fo:background-color="#ffffff" style:font-size-asian="10pt" style:font-size-complex="10pt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color="#3b3b3b" loext:opacity="100%" style:font-name="Droid Sans Mono" fo:font-size="10pt" fo:font-weight="normal" fo:background-color="#ffffff" style:font-size-asian="10pt" style:font-size-complex="10pt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3b3b3b" loext:opacity="100%" style:font-name="Droid Sans Mono" fo:font-size="10pt" fo:font-weight="normal" fo:background-color="#ffffff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3b3b3b" loext:opacity="100%" style:font-name="Droid Sans Mono" fo:font-size="13.5pt" fo:font-weight="normal" fo:background-color="#ffffff"/>
    </style:style>
    <style:style style:name="P18" style:family="paragraph" style:parent-style-name="Standard">
      <style:paragraph-properties fo:margin-left="0cm" fo:margin-right="0cm" style:line-height-at-least="0.635cm" fo:text-align="justify" style:justify-single-word="false" fo:text-indent="0cm" style:auto-text-indent="false"/>
      <style:text-properties fo:color="#3b3b3b" loext:opacity="100%" style:font-name="Droid Sans Mono" fo:font-size="13.5pt" fo:font-weight="normal" officeooo:paragraph-rsid="0014002e" fo:background-color="#ffffff"/>
    </style:style>
    <style:style style:name="P19" style:family="paragraph" style:parent-style-name="Standard">
      <style:paragraph-properties fo:margin-left="0cm" fo:margin-right="0cm" style:line-height-at-least="0.635cm" fo:text-align="justify" style:justify-single-word="false" fo:text-indent="0cm" style:auto-text-indent="false"/>
      <style:text-properties fo:color="#3b3b3b" loext:opacity="100%" style:font-name="Droid Sans Mono" fo:font-size="13.5pt" fo:font-weight="normal" officeooo:rsid="00144c85" officeooo:paragraph-rsid="00144c85" fo:background-color="#ffffff"/>
    </style:style>
    <style:style style:name="P20" style:family="paragraph" style:parent-style-name="Standard">
      <style:paragraph-properties fo:margin-left="0cm" fo:margin-right="0cm" style:line-height-at-least="0.635cm" fo:text-align="justify" style:justify-single-word="false" fo:text-indent="0cm" style:auto-text-indent="false"/>
      <style:text-properties fo:color="#800000" loext:opacity="100%" style:font-name="Droid Sans Mono" fo:font-size="14pt" fo:font-weight="bold" officeooo:rsid="00144c85" officeooo:paragraph-rsid="00144c85" fo:background-color="#ffffff" style:font-size-asian="14pt" style:font-size-complex="14pt"/>
    </style:style>
    <style:style style:name="P21" style:family="paragraph" style:parent-style-name="Standard">
      <style:paragraph-properties fo:margin-left="0cm" fo:margin-right="0cm" style:line-height-at-least="0.635cm" fo:text-indent="0cm" style:auto-text-indent="false"/>
      <style:text-properties fo:color="#800000" loext:opacity="100%" style:font-name="Droid Sans Mono" fo:font-size="13.5pt" fo:font-weight="bold" fo:background-color="#ffffff"/>
    </style:style>
    <style:style style:name="P22" style:family="paragraph" style:parent-style-name="Standard" style:list-style-name="L1" style:master-page-name="">
      <loext:graphic-properties draw:fill="none"/>
      <style:paragraph-properties fo:margin-left="1.3cm" fo:margin-right="0cm" style:line-height-at-least="0.635cm" fo:text-indent="-0.6cm" style:auto-text-indent="false" style:page-number="auto" fo:background-color="transparent"/>
      <style:text-properties fo:color="#3b3b3b" loext:opacity="100%" style:font-name="Droid Sans Mono" fo:font-size="13.5pt" fo:font-weight="normal" fo:background-color="#ffffff"/>
    </style:style>
    <style:style style:name="P23" style:family="paragraph" style:parent-style-name="Standard" style:list-style-name="L1">
      <loext:graphic-properties draw:fill="none"/>
      <style:paragraph-properties fo:margin-left="1.3cm" fo:margin-right="0cm" style:line-height-at-least="0.635cm" fo:text-indent="-0.6cm" style:auto-text-indent="false" fo:background-color="transparent"/>
      <style:text-properties fo:color="#3b3b3b" loext:opacity="100%" style:font-name="Droid Sans Mono" fo:font-size="13.5pt" fo:font-weight="normal" fo:background-color="#ffffff"/>
    </style:style>
    <style:style style:name="P24" style:family="paragraph" style:parent-style-name="Standard" style:list-style-name="L1">
      <style:paragraph-properties style:line-height-at-least="0.635cm"/>
      <style:text-properties fo:color="#3b3b3b" loext:opacity="100%" style:font-name="Droid Sans Mono" fo:font-size="13.5pt" fo:font-weight="normal" fo:background-color="#ffffff"/>
    </style:style>
    <style:style style:name="T1" style:family="text">
      <style:text-properties fo:color="#000080" loext:opacity="100%" fo:font-weight="bold"/>
    </style:style>
    <style:style style:name="T2" style:family="text">
      <style:text-properties fo:color="#0451a5" loext:opacity="100%"/>
    </style:style>
    <style:style style:name="T3" style:family="text">
      <style:text-properties fo:color="#af00db" loext:opacity="100%"/>
    </style:style>
    <style:style style:name="T4" style:family="text">
      <style:text-properties fo:color="#267f99" loext:opacity="100%"/>
    </style:style>
    <style:style style:name="T5" style:family="text">
      <style:text-properties fo:color="#0070c1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795e26" loext:opacity="100%"/>
    </style:style>
    <style:style style:name="T8" style:family="text">
      <style:text-properties fo:color="#a31515" loext:opacity="100%"/>
    </style:style>
    <style:style style:name="T9" style:family="text">
      <style:text-properties fo:color="#098658" loext:opacity="100%"/>
    </style:style>
    <style:style style:name="T10" style:family="text">
      <style:text-properties fo:color="#0000ff" loext:opacity="100%"/>
    </style:style>
    <style:style style:name="T11" style:family="text">
      <style:text-properties fo:color="#001080" loext:opacity="100%"/>
    </style:style>
    <style:style style:name="T12" style:family="text">
      <style:text-properties fo:color="#ee0000" loext:opacity="100%"/>
    </style:style>
    <style:style style:name="T13" style:family="text">
      <style:text-properties fo:color="#800000" loext:opacity="100%" fo:font-weight="bold"/>
    </style:style>
    <style:style style:name="T14" style:family="text">
      <style:text-properties fo:color="#000080" loext:opacity="100%"/>
    </style:style>
    <style:style style:name="T15" style:family="text">
      <style:text-properties fo:color="#80000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бежный контроль №1</text:p>
      <text:p text:style-name="P2"/>
      <text:p text:style-name="P3">Тема: Технологии разведочного анализа и обработки данных.</text:p>
      <text:p text:style-name="P2"/>
      <text:p text:style-name="P3">Исполнитель: Мефодьев Илья Николаевич, группа ИУ5Ц-82Б</text:p>
      <text:p text:style-name="P2"/>
      <text:p text:style-name="P4">Вариант: 28; Номер задачи: 4; Номер набора данных: 4;</text:p>
      <text:p text:style-name="P2"/>
      <text:p text:style-name="P4">Для студентов групп ИУ5-62Б, ИУ5Ц-82Б - для произвольной колонки данных построить гистограмму</text:p>
      <text:p text:style-name="P5"/>
      <text:p text:style-name="P3">Задача №4</text:p>
      <text:p text:style-name="P2"/>
      <text:p text:style-name="P6">Для заданного набора данных постройте основные графики, входящие в этап разведочного анализа данных. В случае наличия пропусков в данных удалите строки или колонки, содержащие пропуски. Какие графики Вы построили и почему? Какие выводы о наборе данных Вы можете сделать на основании построенных графиков?</text:p>
      <text:p text:style-name="P7"/>
      <text:p text:style-name="P8">Ход выполнения</text:p>
      <text:p text:style-name="P2"/>
      <text:p text:style-name="P4">Работаю с датасетом <text:span text:style-name="T1">Heart Disease Dataset</text:span> - https://www.kaggle.com/datasets/johnsmith88/heart-disease-dataset</text:p>
      <text:p text:style-name="P9"/>
      <text:p text:style-name="P6">Этот набор данных датируется 1988 годом и состоит из четырех баз данных в клиниках: Кливленд, Венгрия, Швейцария и Лонг-Бич V. Он содержит 76 атрибутов, включая прогнозируемый атрибут, но во всех опубликованных экспериментах упоминается использование подмножества из 14 из них. </text:p>
      <text:p text:style-name="P10"/>
      <text:p text:style-name="P6">Поле «цель» указывает на наличие сердечного заболевания у пациента. </text:p>
      <text:p text:style-name="P10"/>
      <text:p text:style-name="P6">Оно имеет целочисленное значение: 0 = отсутствие заболевания и 1 = наличие заболевания.</text:p>
      <text:p text:style-name="P2"/>
      <text:p text:style-name="P4">В датасете следующие поля:</text:p>
      <text:p text:style-name="P2"/>
      <text:p text:style-name="P6"><text:span text:style-name="T2">1.</text:span> <text:span text:style-name="T1">age </text:span>- Возраст пациента</text:p>
      <text:p text:style-name="P10"><text:soft-page-break/></text:p>
      <text:p text:style-name="P6"><text:span text:style-name="T2">2.</text:span> <text:span text:style-name="T1">sex</text:span> - Пол пациента (1 = male; 0 = female)</text:p>
      <text:p text:style-name="P10"/>
      <text:p text:style-name="P6"><text:span text:style-name="T2">3.</text:span> <text:span text:style-name="T1">CP = chest pain type (4 values)</text:span> - Тип боли в груди</text:p>
      <text:p text:style-name="P10"/>
      <text:p text:style-name="P6"><text:span text:style-name="T2">4.</text:span> <text:span text:style-name="T1">trestbps = resting blood pressure</text:span> - Артериальное давление в состоянии покоя (в мм рт. ст. при поступлении в больницу)</text:p>
      <text:p text:style-name="P10"/>
      <text:p text:style-name="P6"><text:span text:style-name="T2">5.</text:span> <text:span text:style-name="T1">chol = serum cholestoral in mg/dl</text:span> - уровень холестерина в сыворотке крови (мг/дл)</text:p>
      <text:p text:style-name="P10"/>
      <text:p text:style-name="P6"><text:span text:style-name="T2">6.</text:span> <text:span text:style-name="T1">fbs = fasting blood sugar &gt; 120 mg/dl</text:span> - Уровень сахара в крови натощак &gt; 120 мг/дл (1 = верно; 0 = неверно)</text:p>
      <text:p text:style-name="P10"/>
      <text:p text:style-name="P6"><text:span text:style-name="T2">7.</text:span> <text:span text:style-name="T1">restecg = resting electrocardiographic results (values 0,1,2)</text:span> - результаты электрокардиографии в состоянии покоя</text:p>
      <text:p text:style-name="P10"/>
      <text:p text:style-name="P6"><text:span text:style-name="T2">8.</text:span> <text:span text:style-name="T1">thalach = maximum heart rate achieved</text:span> - максимальная частота сердечных сокращений</text:p>
      <text:p text:style-name="P10"/>
      <text:p text:style-name="P6"><text:span text:style-name="T2">9.</text:span> <text:span text:style-name="T1">exang = exercise induced angina</text:span> - стенокардия, вызванная физической нагрузкой</text:p>
      <text:p text:style-name="P10"/>
      <text:p text:style-name="P6"><text:span text:style-name="T2">10.</text:span> <text:span text:style-name="T1">oldpeak = ST depression induced by exercise relative to rest</text:span> - Снижение сегмента ST, вызванное физической нагрузкой, по сравнению с состоянием покоя</text:p>
      <text:p text:style-name="P10"/>
      <text:p text:style-name="P6"><text:span text:style-name="T2">11.</text:span> <text:span text:style-name="T1">slope = the slope of the peak exercise ST segment</text:span> - наклон пикового сегмента ST во время физической нагрузки</text:p>
      <text:p text:style-name="P10"/>
      <text:p text:style-name="P6"><text:span text:style-name="T2">12.</text:span> <text:span text:style-name="T1">ca = number of major vessels (0-3) colored by flourosopy</text:span> - количество крупных сосудов (0-3), окрашенных с помощью флюороскопии</text:p>
      <text:p text:style-name="P10"/>
      <text:p text:style-name="P6"><text:span text:style-name="T2">13.</text:span> <text:span text:style-name="T1">thal: 0 = normal; 1 = fixed defect; 2 = reversable defect</text:span> - таламус: 0 = норма; 1 = фиксированный дефект; 2 = обратимый дефект</text:p>
      <text:p text:style-name="P10"/>
      <text:p text:style-name="P6"><text:span text:style-name="T2">14.</text:span> <text:span text:style-name="T1">target</text:span> - Поле «цель» указывает на наличие сердечного заболевания у пациента. 1 или 0</text:p>
      <text:p text:style-name="P11"><text:soft-page-break/></text:p>
      <text:p text:style-name="P6">Первым делом импортируем необходимые библиотеки и выведем первые 10 элементов датасета</text:p>
      <text:p text:style-name="P7"/>
      <text:p text:style-name="P12"># добавим необходимые модули</text:p>
      <text:p text:style-name="P13"><text:span text:style-name="T3">import</text:span> <text:span text:style-name="T4">pandas</text:span> <text:span text:style-name="T3">as</text:span> <text:span text:style-name="T4">pd</text:span></text:p>
      <text:p text:style-name="P13"><text:span text:style-name="T3">import</text:span> <text:span text:style-name="T4">matplotlib</text:span>.<text:span text:style-name="T4">pyplot</text:span> <text:span text:style-name="T3">as</text:span> <text:span text:style-name="T4">plt</text:span></text:p>
      <text:p text:style-name="P13"><text:span text:style-name="T3">import</text:span> <text:span text:style-name="T4">seaborn</text:span> <text:span text:style-name="T3">as</text:span> <text:span text:style-name="T4">sns</text:span></text:p>
      <text:p text:style-name="P14"/>
      <text:p text:style-name="P15"><text:span text:style-name="T5">HEART_ORIGIN</text:span> <text:span text:style-name="T6">=</text:span> <text:span text:style-name="T4">pd</text:span>.<text:span text:style-name="T7">read_csv</text:span>(<text:span text:style-name="T8">"./heart.csv"</text:span>)</text:p>
      <text:p text:style-name="P16"/>
      <text:p text:style-name="P13"><text:span text:style-name="T5">HEART_ORIGIN</text:span>.<text:span text:style-name="T7">head</text:span>(<text:span text:style-name="T9">10</text:span>)</text:p>
      <text:p text:style-name="P17"><draw:frame draw:style-name="fr1" draw:name="Image1" text:anchor-type="char" svg:width="17cm" svg:height="6.9cm" draw:z-index="0"><draw:image xlink:href="Pictures/1000000100000477000001D074602BD5.png" xlink:type="simple" xlink:show="embed" xlink:actuate="onLoad" draw:mime-type="image/png"/></draw:frame></text:p>
      <text:p text:style-name="P18">Для начала посмотрим на ситуацию с пропусками</text:p>
      <text:p text:style-name="P18"/>
      <text:p text:style-name="P18"><text:span text:style-name="T7">print</text:span>(<text:span text:style-name="T8">'Всего строк: </text:span><text:span text:style-name="T10">{}</text:span><text:span text:style-name="T8">'</text:span>.<text:span text:style-name="T7">format</text:span>(<text:span text:style-name="T5">HEART_ORIGIN</text:span>.<text:span text:style-name="T11">shape</text:span>[<text:span text:style-name="T9">0</text:span>]))</text:p>
      <text:p text:style-name="P2"/>
      <text:p text:style-name="P4"><text:span text:style-name="T7">print</text:span>(<text:span text:style-name="T10">f</text:span><text:span text:style-name="T8">"</text:span><text:span text:style-name="T12">\n</text:span><text:span text:style-name="T8">Всего пропусков: </text:span><text:span text:style-name="T10">{</text:span><text:span text:style-name="T5">HEART_ORIGIN</text:span>.<text:span text:style-name="T7">isnull</text:span>().<text:span text:style-name="T7">sum</text:span>().<text:span text:style-name="T7">sum</text:span>()<text:span text:style-name="T10">}</text:span><text:span text:style-name="T8">"</text:span>)</text:p>
      <text:p text:style-name="P2"/>
      <text:p text:style-name="P4"><text:span text:style-name="T3">for</text:span> <text:span text:style-name="T11">i</text:span> <text:span text:style-name="T3">in</text:span> <text:span text:style-name="T4">list</text:span>(<text:span text:style-name="T5">HEART_ORIGIN</text:span>.<text:span text:style-name="T11">columns</text:span>):</text:p>
      <text:p text:style-name="P4"><text:span text:style-name="T7">print</text:span>(<text:span text:style-name="T11">i</text:span> <text:span text:style-name="T6">+</text:span> <text:span text:style-name="T8">"</text:span><text:span text:style-name="T12">\t</text:span><text:span text:style-name="T8">"</text:span> <text:span text:style-name="T6">+</text:span> <text:span text:style-name="T4">str</text:span>(<text:span text:style-name="T5">HEART_ORIGIN</text:span>[<text:span text:style-name="T11">i</text:span>].<text:span text:style-name="T7">isnull</text:span>().<text:span text:style-name="T7">sum</text:span>()) <text:span text:style-name="T6">+</text:span> <text:span text:style-name="T8">"</text:span><text:span text:style-name="T12">\t</text:span><text:span text:style-name="T8">"</text:span> <text:span text:style-name="T6">+</text:span> <text:span text:style-name="T4">str</text:span>(<text:span text:style-name="T7">round</text:span>(<text:span text:style-name="T5">HEART_ORIGIN</text:span>[<text:span text:style-name="T11">i</text:span>].<text:span text:style-name="T7">isnull</text:span>().<text:span text:style-name="T7">mean</text:span>()<text:span text:style-name="T6">*</text:span><text:span text:style-name="T9">100</text:span>, <text:span text:style-name="T9">2</text:span>)) <text:span text:style-name="T6">+</text:span> <text:span text:style-name="T8">"%"</text:span>)</text:p>
      <text:p text:style-name="P18"/>
      <text:p text:style-name="P18"/>
      <text:p text:style-name="P18"/>
      <text:p text:style-name="P18"/>
      <text:p text:style-name="P18"><draw:frame draw:style-name="fr2" draw:name="Image2" text:anchor-type="char" svg:x="6.8cm" svg:y="0.603cm" svg:width="7.239cm" svg:height="9.144cm" draw:z-index="1"><draw:image xlink:href="Pictures/1000000100000193000001FD65CC8CB0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Отличные новости! Пропусков нету, следовательно, не нужно с ними работать</text:p>
      <text:p text:style-name="P2"/>
      <text:p text:style-name="P4">Дальше сразу построим гистограмму возрастов пациентов</text:p>
      <text:p text:style-name="P18"/>
      <text:p text:style-name="P18"><text:span text:style-name="T4">plt</text:span>.<text:span text:style-name="T7">figure</text:span>(<text:span text:style-name="T11">figsize</text:span><text:span text:style-name="T6">=</text:span>(<text:span text:style-name="T9">6</text:span>, <text:span text:style-name="T9">4</text:span>))</text:p>
      <text:p text:style-name="P4"><text:span text:style-name="T4">sns</text:span>.<text:span text:style-name="T7">histplot</text:span>(<text:span text:style-name="T11">data</text:span><text:span text:style-name="T6">=</text:span><text:span text:style-name="T5">HEART_ORIGIN</text:span>, <text:span text:style-name="T11">x</text:span><text:span text:style-name="T6">=</text:span><text:span text:style-name="T8">'age'</text:span>, <text:span text:style-name="T11">bins</text:span><text:span text:style-name="T6">=</text:span><text:span text:style-name="T9">20</text:span>, <text:span text:style-name="T11">kde</text:span><text:span text:style-name="T6">=</text:span><text:span text:style-name="T10">True</text:span>, <text:span text:style-name="T11">color</text:span><text:span text:style-name="T6">=</text:span><text:span text:style-name="T8">'skyblue'</text:span>)</text:p>
      <text:p text:style-name="P4"><text:span text:style-name="T4">plt</text:span>.<text:span text:style-name="T7">title</text:span>(<text:span text:style-name="T8">'Распределение возраста пациентов'</text:span>)</text:p>
      <text:p text:style-name="P4"><text:span text:style-name="T4">plt</text:span>.<text:span text:style-name="T7">xlabel</text:span>(<text:span text:style-name="T8">'Возраст'</text:span>)</text:p>
      <text:p text:style-name="P4"><text:span text:style-name="T4">plt</text:span>.<text:span text:style-name="T7">ylabel</text:span>(<text:span text:style-name="T8">'Частота'</text:span>)</text:p>
      <text:p text:style-name="P4"><text:span text:style-name="T4">plt</text:span>.<text:span text:style-name="T7">show</text:span>()</text:p>
      <text:p text:style-name="P18"/>
      <text:p text:style-name="P18"><draw:frame draw:style-name="fr3" draw:name="Image3" text:anchor-type="char" svg:width="9.975cm" svg:height="7.26cm" draw:z-index="2"><draw:image xlink:href="Pictures/100000000000021C0000018952386E4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На гистограмме видно, что большинство пациентов прибывает в возрасте 60 лет. Также есть скачок в группе сорокалетних.</text:p>
      <text:p text:style-name="P18"/>
      <text:p text:style-name="P18">Далее построим корреляционную тепловую карту</text:p>
      <text:p text:style-name="P18"/>
      <text:p text:style-name="P18"><text:span text:style-name="T4">plt</text:span>.<text:span text:style-name="T7">figure</text:span>(<text:span text:style-name="T11">figsize</text:span><text:span text:style-name="T6">=</text:span>(<text:span text:style-name="T9">10</text:span>, <text:span text:style-name="T9">8</text:span>))</text:p>
      <text:p text:style-name="P4"><text:span text:style-name="T4">sns</text:span>.<text:span text:style-name="T7">heatmap</text:span>(<text:span text:style-name="T5">HEART_ORIGIN</text:span>.<text:span text:style-name="T7">corr</text:span>(), <text:span text:style-name="T11">annot</text:span><text:span text:style-name="T6">=</text:span><text:span text:style-name="T10">True</text:span>, <text:span text:style-name="T11">cmap</text:span><text:span text:style-name="T6">=</text:span><text:span text:style-name="T8">'coolwarm'</text:span>, <text:span text:style-name="T11">fmt</text:span><text:span text:style-name="T6">=</text:span><text:span text:style-name="T8">'.2f'</text:span>, <text:span text:style-name="T11">linewidths</text:span><text:span text:style-name="T6">=</text:span><text:span text:style-name="T9">0.5</text:span>)</text:p>
      <text:p text:style-name="P4"><text:span text:style-name="T4">plt</text:span>.<text:span text:style-name="T7">title</text:span>(<text:span text:style-name="T8">'Корреляционная матрица признаков'</text:span>)</text:p>
      <text:p text:style-name="P4"><text:span text:style-name="T4">plt</text:span>.<text:span text:style-name="T7">show</text:span>()</text:p>
      <text:p text:style-name="P18"><draw:frame draw:style-name="fr2" draw:name="Image4" text:anchor-type="char" svg:x="2.531cm" svg:y="0.51cm" svg:width="12.712cm" svg:height="11.254cm" draw:z-index="3"><draw:image xlink:href="Pictures/1000000000000333000002D53846634A.png" xlink:type="simple" xlink:show="embed" xlink:actuate="onLoad" draw:mime-type="image/png"/></draw:frame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Сильных корреляций не найдено, хотя обратных корреляций немало. В глаза бросается обратная корреляция между наклоном и падением ST (не могу сказать, что именно означает этот медицинский термин)</text:p>
      <text:p text:style-name="P2"/>
      <text:p text:style-name="P4">Далее посмотрим на распределение целевой переменной - есть ли у пациента сердечное заболевание?</text:p>
      <text:p text:style-name="P19"/>
      <text:p text:style-name="P19"><text:span text:style-name="T4">plt</text:span>.<text:span text:style-name="T7">figure</text:span>(<text:span text:style-name="T11">figsize</text:span><text:span text:style-name="T6">=</text:span>(<text:span text:style-name="T9">5</text:span>, <text:span text:style-name="T9">4</text:span>))</text:p>
      <text:p text:style-name="P4"><text:span text:style-name="T4">sns</text:span>.<text:span text:style-name="T7">countplot</text:span>(<text:span text:style-name="T11">data</text:span><text:span text:style-name="T6">=</text:span><text:span text:style-name="T5">HEART_ORIGIN</text:span>, <text:span text:style-name="T11">x</text:span><text:span text:style-name="T6">=</text:span><text:span text:style-name="T8">'target'</text:span>, <text:span text:style-name="T11">palette</text:span><text:span text:style-name="T6">=</text:span><text:span text:style-name="T8">'pastel'</text:span>)</text:p>
      <text:p text:style-name="P4"><text:soft-page-break/><text:span text:style-name="T4">plt</text:span>.<text:span text:style-name="T7">title</text:span>(<text:span text:style-name="T8">'Баланс классов: наличие сердечного заболевания (0 - нет, 1 - есть)'</text:span>)</text:p>
      <text:p text:style-name="P4"><text:span text:style-name="T4">plt</text:span>.<text:span text:style-name="T7">xlabel</text:span>(<text:span text:style-name="T8">'target'</text:span>)</text:p>
      <text:p text:style-name="P4"><text:span text:style-name="T4">plt</text:span>.<text:span text:style-name="T7">ylabel</text:span>(<text:span text:style-name="T8">'Количество записей'</text:span>)</text:p>
      <text:p text:style-name="P4"><text:span text:style-name="T4">plt</text:span>.<text:span text:style-name="T7">show</text:span>()</text:p>
      <text:p text:style-name="P19"/>
      <text:p text:style-name="P19"><draw:frame draw:style-name="fr4" draw:name="Image5" text:anchor-type="char" svg:width="11.044cm" svg:height="7.047cm" draw:z-index="4"><draw:image xlink:href="Pictures/100000000000026800000189E111DBB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Видно, что пропорция почти равная, что неудивительно, учитывая места сбора статистики. Например, в армейской казарме статистика была бы куда сильнее выражена в пользу здоровых людей</text:p>
      <text:p text:style-name="P2"/>
      <text:p text:style-name="P4">Далее посмотрим, например, макисмальную ЧСС для людей с сердечными заболеваниями и без него</text:p>
      <text:p text:style-name="P19"/>
      <text:p text:style-name="P19"><text:span text:style-name="T4">plt</text:span>.<text:span text:style-name="T7">figure</text:span>(<text:span text:style-name="T11">figsize</text:span><text:span text:style-name="T6">=</text:span>(<text:span text:style-name="T9">6</text:span>, <text:span text:style-name="T9">5</text:span>))</text:p>
      <text:p text:style-name="P4"><text:span text:style-name="T4">sns</text:span>.<text:span text:style-name="T7">boxplot</text:span>(<text:span text:style-name="T11">data</text:span><text:span text:style-name="T6">=</text:span><text:span text:style-name="T5">HEART_ORIGIN</text:span>, <text:span text:style-name="T11">x</text:span><text:span text:style-name="T6">=</text:span><text:span text:style-name="T8">'target'</text:span>, <text:span text:style-name="T11">y</text:span><text:span text:style-name="T6">=</text:span><text:span text:style-name="T8">'thalach'</text:span>, <text:span text:style-name="T11">palette</text:span><text:span text:style-name="T6">=</text:span><text:span text:style-name="T8">'Set2'</text:span>)</text:p>
      <text:p text:style-name="P4"><text:span text:style-name="T4">plt</text:span>.<text:span text:style-name="T7">title</text:span>(<text:span text:style-name="T8">'Максимальная ЧСС в зависимости от наличия сердечного заболевания'</text:span>)</text:p>
      <text:p text:style-name="P4"><text:span text:style-name="T4">plt</text:span>.<text:span text:style-name="T7">xlabel</text:span>(<text:span text:style-name="T8">'target (0 - здоров, 1 - болен)'</text:span>)</text:p>
      <text:p text:style-name="P4"><text:span text:style-name="T4">plt</text:span>.<text:span text:style-name="T7">ylabel</text:span>(<text:span text:style-name="T8">'thalach (макс. ЧСС)'</text:span>)</text:p>
      <text:p text:style-name="P4"><text:span text:style-name="T4">plt</text:span>.<text:span text:style-name="T7">show</text:span>()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6" text:anchor-type="char" svg:x="2.17cm" svg:y="-0.607cm" svg:width="12.323cm" svg:height="8.95cm" draw:z-index="5"><draw:image xlink:href="Pictures/1000000000000287000001D6BF47B219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Результат ожидаемый - у "сердечников" ЧСС оказалась выше, чем у людей без сердечных заболеваний</text:p>
      <text:p text:style-name="P19"/>
      <text:p text:style-name="P20">Построенные графики и обоснование выбора</text:p>
      <text:p text:style-name="P4"><text:span text:style-name="T2">1.</text:span> <text:span text:style-name="T1">Гистограмма </text:span><text:span text:style-name="T13">`age`</text:span> — для анализа распределения возрастного состава выборки.</text:p>
      <text:p text:style-name="P4"><text:span text:style-name="T2">2.</text:span> <text:span text:style-name="T1">Тепловая карта корреляций </text:span>— поиск корреляций между признаками.</text:p>
      <text:p text:style-name="P4"><text:span text:style-name="T2">3.</text:span> <text:span text:style-name="T1">Столбчатая диаграмма </text:span><text:span text:style-name="T13">`target`</text:span> — проверка баланса классов.</text:p>
      <text:p text:style-name="P4"><text:span text:style-name="T2">4.</text:span> <text:span text:style-name="T1">Boxplot </text:span><text:span text:style-name="T13">`thalach`</text:span><text:span text:style-name="T14"> </text:span><text:span text:style-name="T1">по </text:span><text:span text:style-name="T13">`target`</text:span> — визуальное сравнение показателя у пациентов с болезнью и без.</text:p>
      <text:p text:style-name="P2"/>
      <text:p text:style-name="P21">Выводы по набору данных</text:p>
      <text:list text:style-name="L1">
        <text:list-item>
          <text:p text:style-name="P22">Пропусков в данных нет, объём выборки: 1025 записей.</text:p>
        </text:list-item>
        <text:list-item>
          <text:p text:style-name="P23">Распределение возраста близко к нормальному с лёгким смещением, присутствует небольшой скачок в группе сорокалетних.</text:p>
        </text:list-item>
        <text:list-item>
          <text:p text:style-name="P23">Классы <text:span text:style-name="T15">`target`</text:span> слегка несбалансированы, но на статистику это не влияет.</text:p>
        </text:list-item>
        <text:list-item>
          <text:p text:style-name="P23">Наибольшую отрицательную корреляцию с наличием болезни имеют <text:span text:style-name="T15">`exang`</text:span> и <text:span text:style-name="T15">`oldpeak`</text:span> (оба ~ -0,44), положительную — <text:span text:style-name="T15">`cp`</text:span> (~ 0,43).</text:p>
        </text:list-item>
        <text:list-item>
          <text:p text:style-name="P23">У пациентов с сердечным заболеванием медианная максимальная ЧСС статистически выше, а разброс значений меньше.</text:p>
        </text:list-item>
        <text:list-item>
          <text:p text:style-name="P24"><text:soft-page-break/><text:span text:style-name="T2">-</text:span> Набор данных чист, признаков достаточно для построения бинарного классификатора. Рекомендуется перед моделированием выполнить масштабирование числовых признаков.</text:p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16:20:31.279165983</meta:creation-date>
    <dc:date>2026-04-30T16:31:00.760133625</dc:date>
    <meta:editing-duration>PT10M29S</meta:editing-duration>
    <meta:editing-cycles>2</meta:editing-cycles>
    <meta:generator>LibreOffice/25.8.6.2$Linux_X86_64 LibreOffice_project/580$Build-2</meta:generator>
    <meta:document-statistic meta:table-count="0" meta:image-count="6" meta:object-count="0" meta:page-count="8" meta:paragraph-count="82" meta:word-count="777" meta:character-count="5871" meta:non-whitespace-character-count="5175"/>
  </office:meta>
</office:document-meta>
</file>